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0FE000000D92716476D.png" manifest:media-type="image/png"/>
  <manifest:file-entry manifest:full-path="Pictures/10000000000000F1000000BB92D3BDA1.png" manifest:media-type="image/png"/>
  <manifest:file-entry manifest:full-path="Pictures/10000000000000BB00000028EEFB3CA0.png" manifest:media-type="image/png"/>
  <manifest:file-entry manifest:full-path="Pictures/10000000000000B90000009F246F5FCD.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officeooo:rsid="00108599" officeooo:paragraph-rsid="00108599" style:font-weight-asian="bold" style:font-weight-complex="bold"/>
    </style:style>
    <style:style style:name="P2" style:family="paragraph" style:parent-style-name="Standard">
      <style:paragraph-properties fo:text-align="start" style:justify-single-word="false"/>
      <style:text-properties style:text-underline-style="solid" style:text-underline-width="auto" style:text-underline-color="font-color" fo:font-weight="bold" officeooo:rsid="00108599" officeooo:paragraph-rsid="00108599" style:font-weight-asian="bold" style:font-weight-complex="bold"/>
    </style:style>
    <style:style style:name="P3" style:family="paragraph" style:parent-style-name="Standard">
      <style:paragraph-properties fo:text-align="start" style:justify-single-word="false"/>
      <style:text-properties style:text-underline-style="none" fo:font-weight="normal" officeooo:rsid="00108599" officeooo:paragraph-rsid="00108599" style:font-weight-asian="normal" style:font-weight-complex="normal"/>
    </style:style>
    <style:style style:name="P4" style:family="paragraph" style:parent-style-name="Standard">
      <style:paragraph-properties fo:text-align="start" style:justify-single-word="false"/>
      <style:text-properties style:text-underline-style="none" fo:font-weight="normal" officeooo:rsid="003213a9" officeooo:paragraph-rsid="003213a9" style:font-weight-asian="normal" style:font-weight-complex="normal"/>
    </style:style>
    <style:style style:name="P5" style:family="paragraph" style:parent-style-name="Standard">
      <style:paragraph-properties fo:text-align="start" style:justify-single-word="false"/>
      <style:text-properties style:text-underline-style="none" fo:font-weight="bold" officeooo:rsid="001143c0" officeooo:paragraph-rsid="001143c0" style:font-weight-asian="bold" style:font-weight-complex="bold"/>
    </style:style>
    <style:style style:name="P6" style:family="paragraph" style:parent-style-name="Standard">
      <style:paragraph-properties fo:text-align="start" style:justify-single-word="false"/>
      <style:text-properties style:text-underline-style="none" fo:font-weight="bold" officeooo:rsid="003213a9" officeooo:paragraph-rsid="003213a9" style:font-weight-asian="bold" style:font-weight-complex="bold"/>
    </style:style>
    <style:style style:name="P7" style:family="paragraph" style:parent-style-name="Standard">
      <style:paragraph-properties fo:text-align="start" style:justify-single-word="false"/>
      <style:text-properties style:text-underline-style="none" fo:font-weight="bold" officeooo:rsid="001143c0" officeooo:paragraph-rsid="003213a9" style:font-weight-asian="bold" style:font-weight-complex="bold"/>
    </style:style>
    <style:style style:name="P8" style:family="paragraph" style:parent-style-name="Standard">
      <style:paragraph-properties fo:text-align="start" style:justify-single-word="false"/>
      <style:text-properties style:text-underline-style="none" fo:font-weight="normal" officeooo:rsid="00122725" officeooo:paragraph-rsid="001143c0" style:font-weight-asian="normal" style:font-weight-complex="normal"/>
    </style:style>
    <style:style style:name="P9" style:family="paragraph" style:parent-style-name="Standard">
      <style:paragraph-properties fo:text-align="start" style:justify-single-word="false"/>
      <style:text-properties style:text-underline-style="none" fo:font-weight="normal" officeooo:rsid="0012a36a" officeooo:paragraph-rsid="0012a36a" style:font-weight-asian="normal" style:font-weight-complex="normal"/>
    </style:style>
    <style:style style:name="P10" style:family="paragraph" style:parent-style-name="Standard">
      <style:paragraph-properties fo:text-align="start" style:justify-single-word="false"/>
      <style:text-properties style:text-underline-style="none" fo:font-weight="normal" officeooo:rsid="00348341" officeooo:paragraph-rsid="00348341" style:font-weight-asian="normal" style:font-weight-complex="normal"/>
    </style:style>
    <style:style style:name="P11" style:family="paragraph" style:parent-style-name="Standard">
      <style:paragraph-properties fo:text-align="start" style:justify-single-word="false"/>
      <style:text-properties style:text-underline-style="none" fo:font-weight="normal" officeooo:rsid="00122725" officeooo:paragraph-rsid="00348341" style:font-weight-asian="normal" style:font-weight-complex="normal"/>
    </style:style>
    <style:style style:name="P12" style:family="paragraph" style:parent-style-name="Standard">
      <style:paragraph-properties fo:text-align="start" style:justify-single-word="false"/>
      <style:text-properties style:text-underline-style="none" fo:font-weight="normal" officeooo:rsid="001143c0" officeooo:paragraph-rsid="001143c0" style:font-weight-asian="normal" style:font-weight-complex="normal"/>
    </style:style>
    <style:style style:name="P13" style:family="paragraph" style:parent-style-name="Standard">
      <style:paragraph-properties fo:text-align="start" style:justify-single-word="false"/>
      <style:text-properties style:text-underline-style="none" fo:font-weight="normal" officeooo:rsid="0012a36a" officeooo:paragraph-rsid="001143c0" style:font-weight-asian="normal" style:font-weight-complex="normal"/>
    </style:style>
    <style:style style:name="P14" style:family="paragraph" style:parent-style-name="Standard">
      <style:paragraph-properties fo:text-align="start" style:justify-single-word="false"/>
      <style:text-properties style:text-underline-style="solid" style:text-underline-width="auto" style:text-underline-color="font-color" fo:font-weight="bold" officeooo:rsid="0012a36a" officeooo:paragraph-rsid="0012a36a" style:font-weight-asian="bold" style:font-weight-complex="bold"/>
    </style:style>
    <style:style style:name="P15" style:family="paragraph" style:parent-style-name="Standard">
      <style:paragraph-properties fo:text-align="start" style:justify-single-word="false"/>
      <style:text-properties style:text-underline-style="none" fo:font-weight="normal" officeooo:rsid="00349cdd" officeooo:paragraph-rsid="00349cdd" style:font-weight-asian="normal" style:font-weight-complex="normal"/>
    </style:style>
    <style:style style:name="P16" style:family="paragraph" style:parent-style-name="Standard">
      <style:paragraph-properties fo:text-align="start" style:justify-single-word="false"/>
      <style:text-properties style:text-underline-style="solid" style:text-underline-width="auto" style:text-underline-color="font-color" fo:font-weight="bold" officeooo:rsid="00176d7c" officeooo:paragraph-rsid="00176d7c" style:font-weight-asian="bold" style:font-weight-complex="bold"/>
    </style:style>
    <style:style style:name="P17" style:family="paragraph" style:parent-style-name="Standard">
      <style:paragraph-properties fo:text-align="start" style:justify-single-word="false"/>
      <style:text-properties style:text-underline-style="none" fo:font-weight="normal" officeooo:rsid="00176d7c" officeooo:paragraph-rsid="00176d7c" style:font-weight-asian="normal" style:font-weight-complex="normal"/>
    </style:style>
    <style:style style:name="P18" style:family="paragraph" style:parent-style-name="Standard">
      <style:paragraph-properties fo:text-align="start" style:justify-single-word="false"/>
      <style:text-properties style:text-underline-style="none" fo:font-weight="normal" officeooo:rsid="00176d7c" officeooo:paragraph-rsid="001d45fb" style:font-weight-asian="normal" style:font-weight-complex="normal"/>
    </style:style>
    <style:style style:name="P19" style:family="paragraph" style:parent-style-name="Standard">
      <style:paragraph-properties fo:text-align="start" style:justify-single-word="false"/>
      <style:text-properties style:text-underline-style="none" fo:font-weight="normal" officeooo:rsid="001d45fb" officeooo:paragraph-rsid="001d45fb" style:font-weight-asian="normal" style:font-weight-complex="normal"/>
    </style:style>
    <style:style style:name="P20" style:family="paragraph" style:parent-style-name="Standard">
      <style:paragraph-properties fo:text-align="start" style:justify-single-word="false"/>
      <style:text-properties style:text-underline-style="solid" style:text-underline-width="auto" style:text-underline-color="font-color" fo:font-weight="bold" officeooo:rsid="002198fa" officeooo:paragraph-rsid="002198fa" style:font-weight-asian="bold" style:font-weight-complex="bold"/>
    </style:style>
    <style:style style:name="P21" style:family="paragraph" style:parent-style-name="Standard">
      <style:paragraph-properties fo:text-align="start" style:justify-single-word="false"/>
      <style:text-properties style:text-underline-style="none" fo:font-weight="normal" officeooo:rsid="002198fa" officeooo:paragraph-rsid="002198fa" style:font-weight-asian="normal" style:font-weight-complex="normal"/>
    </style:style>
    <style:style style:name="P22" style:family="paragraph" style:parent-style-name="Standard">
      <style:paragraph-properties fo:text-align="start" style:justify-single-word="false"/>
      <style:text-properties style:text-underline-style="none" fo:font-weight="normal" officeooo:rsid="002198fa" officeooo:paragraph-rsid="0022fb7f" style:font-weight-asian="normal" style:font-weight-complex="normal"/>
    </style:style>
    <style:style style:name="P23" style:family="paragraph" style:parent-style-name="Standard">
      <style:paragraph-properties fo:text-align="start" style:justify-single-word="false"/>
      <style:text-properties style:text-underline-style="none" fo:font-weight="normal" officeooo:rsid="0029d25b" officeooo:paragraph-rsid="0029d25b" style:font-weight-asian="normal" style:font-weight-complex="normal"/>
    </style:style>
    <style:style style:name="P24" style:family="paragraph" style:parent-style-name="Standard">
      <style:paragraph-properties fo:text-align="start" style:justify-single-word="false"/>
      <style:text-properties style:text-underline-style="none" fo:font-weight="bold" officeooo:rsid="002d1186" officeooo:paragraph-rsid="0029d25b" style:font-weight-asian="bold" style:font-weight-complex="bold"/>
    </style:style>
    <style:style style:name="P25" style:family="paragraph" style:parent-style-name="Standard">
      <style:paragraph-properties fo:text-align="start" style:justify-single-word="false"/>
      <style:text-properties style:text-underline-style="none" fo:font-weight="normal" officeooo:rsid="002d1186" officeooo:paragraph-rsid="0029d25b" style:font-weight-asian="normal" style:font-weight-complex="normal"/>
    </style:style>
    <style:style style:name="P26" style:family="paragraph" style:parent-style-name="Standard">
      <style:paragraph-properties fo:text-align="start" style:justify-single-word="false"/>
      <style:text-properties style:text-underline-style="none" fo:font-weight="bold" officeooo:rsid="0030ad5d" officeooo:paragraph-rsid="0030ad5d" style:font-weight-asian="bold" style:font-weight-complex="bold"/>
    </style:style>
    <style:style style:name="P27" style:family="paragraph" style:parent-style-name="Standard">
      <style:paragraph-properties fo:text-align="start" style:justify-single-word="false"/>
      <style:text-properties style:text-underline-style="none" fo:font-weight="normal" officeooo:rsid="0030ad5d" officeooo:paragraph-rsid="0030ad5d" style:font-weight-asian="normal" style:font-weight-complex="normal"/>
    </style:style>
    <style:style style:name="P28" style:family="paragraph" style:parent-style-name="Standard">
      <style:paragraph-properties fo:text-align="start" style:justify-single-word="false"/>
      <style:text-properties style:text-underline-style="none" fo:font-weight="normal" officeooo:rsid="0030bea7" officeooo:paragraph-rsid="0030bea7" style:font-weight-asian="normal" style:font-weight-complex="normal"/>
    </style:style>
    <style:style style:name="P29" style:family="paragraph" style:parent-style-name="Standard">
      <style:paragraph-properties fo:text-align="start" style:justify-single-word="false"/>
      <style:text-properties style:text-underline-style="none" fo:font-weight="bold" officeooo:rsid="002e412f" officeooo:paragraph-rsid="002e412f" style:font-weight-asian="bold" style:font-weight-complex="bold"/>
    </style:style>
    <style:style style:name="P30" style:family="paragraph" style:parent-style-name="Standard">
      <style:paragraph-properties fo:text-align="start" style:justify-single-word="false"/>
      <style:text-properties style:text-underline-style="none" fo:font-weight="normal" officeooo:rsid="002e412f" officeooo:paragraph-rsid="002e412f" style:font-weight-asian="normal" style:font-weight-complex="normal"/>
    </style:style>
    <style:style style:name="P31" style:family="paragraph" style:parent-style-name="Standard">
      <style:paragraph-properties fo:text-align="start" style:justify-single-word="false"/>
      <style:text-properties style:text-underline-style="none" fo:font-weight="bold" officeooo:rsid="00315585" officeooo:paragraph-rsid="00315585" style:font-weight-asian="bold" style:font-weight-complex="bold"/>
    </style:style>
    <style:style style:name="P32" style:family="paragraph" style:parent-style-name="Standard">
      <style:paragraph-properties fo:text-align="start" style:justify-single-word="false"/>
      <style:text-properties style:text-underline-style="none" fo:font-weight="normal" officeooo:rsid="00315585" officeooo:paragraph-rsid="00315585" style:font-weight-asian="normal" style:font-weight-complex="normal"/>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officeooo:rsid="001143c0"/>
    </style:style>
    <style:style style:name="T4" style:family="text">
      <style:text-properties style:text-underline-style="solid" style:text-underline-width="auto" style:text-underline-color="font-color" fo:font-weight="normal" officeooo:rsid="00122725" style:font-weight-asian="normal" style:font-weight-complex="normal"/>
    </style:style>
    <style:style style:name="T5" style:family="text">
      <style:text-properties fo:font-weight="normal" officeooo:rsid="00122725" style:font-weight-asian="normal" style:font-weight-complex="normal"/>
    </style:style>
    <style:style style:name="T6" style:family="text">
      <style:text-properties officeooo:rsid="003213a9"/>
    </style:style>
    <style:style style:name="T7" style:family="text">
      <style:text-properties officeooo:rsid="00348341"/>
    </style:style>
    <style:style style:name="T8" style:family="text">
      <style:text-properties style:text-underline-style="solid" style:text-underline-width="auto" style:text-underline-color="font-color" fo:font-weight="normal" style:font-weight-asian="normal" style:font-weight-complex="normal"/>
    </style:style>
    <style:style style:name="T9" style:family="text">
      <style:text-properties style:text-underline-style="solid" style:text-underline-width="auto" style:text-underline-color="font-color" officeooo:rsid="0012a36a"/>
    </style:style>
    <style:style style:name="T10" style:family="text">
      <style:text-properties style:text-underline-style="solid" style:text-underline-width="auto" style:text-underline-color="font-color" officeooo:rsid="00136d30"/>
    </style:style>
    <style:style style:name="T11" style:family="text">
      <style:text-properties officeooo:rsid="00136d30"/>
    </style:style>
    <style:style style:name="T12" style:family="text">
      <style:text-properties style:text-underline-style="solid" style:text-underline-width="auto" style:text-underline-color="font-color" officeooo:rsid="00155724"/>
    </style:style>
    <style:style style:name="T13" style:family="text">
      <style:text-properties officeooo:rsid="00155724"/>
    </style:style>
    <style:style style:name="T14" style:family="text">
      <style:text-properties officeooo:rsid="00160f8a"/>
    </style:style>
    <style:style style:name="T15" style:family="text">
      <style:text-properties officeooo:rsid="0017f1fd"/>
    </style:style>
    <style:style style:name="T16" style:family="text">
      <style:text-properties officeooo:rsid="001a35dc"/>
    </style:style>
    <style:style style:name="T17" style:family="text">
      <style:text-properties style:text-underline-style="solid" style:text-underline-width="auto" style:text-underline-color="font-color" officeooo:rsid="00192818"/>
    </style:style>
    <style:style style:name="T18" style:family="text">
      <style:text-properties officeooo:rsid="00192818"/>
    </style:style>
    <style:style style:name="T19" style:family="text">
      <style:text-properties officeooo:rsid="001b48e3"/>
    </style:style>
    <style:style style:name="T20" style:family="text">
      <style:text-properties officeooo:rsid="002198fa"/>
    </style:style>
    <style:style style:name="T21" style:family="text">
      <style:text-properties style:text-underline-style="solid" style:text-underline-width="auto" style:text-underline-color="font-color" officeooo:rsid="001d45fb"/>
    </style:style>
    <style:style style:name="T22" style:family="text">
      <style:text-properties officeooo:rsid="001d45fb"/>
    </style:style>
    <style:style style:name="T23" style:family="text">
      <style:text-properties officeooo:rsid="001def30"/>
    </style:style>
    <style:style style:name="T24" style:family="text">
      <style:text-properties officeooo:rsid="001f77a0"/>
    </style:style>
    <style:style style:name="T25" style:family="text">
      <style:text-properties officeooo:rsid="0022fb7f"/>
    </style:style>
    <style:style style:name="T26" style:family="text">
      <style:text-properties officeooo:rsid="00248803"/>
    </style:style>
    <style:style style:name="T27" style:family="text">
      <style:text-properties officeooo:rsid="0028fe05"/>
    </style:style>
    <style:style style:name="T28" style:family="text">
      <style:text-properties officeooo:rsid="002926e1"/>
    </style:style>
    <style:style style:name="T29" style:family="text">
      <style:text-properties style:text-underline-style="solid" style:text-underline-width="auto" style:text-underline-color="font-color" officeooo:rsid="002c78bb"/>
    </style:style>
    <style:style style:name="T30" style:family="text">
      <style:text-properties officeooo:rsid="002c78bb"/>
    </style:style>
    <style:style style:name="T31" style:family="text">
      <style:text-properties fo:font-weight="normal" style:font-weight-asian="normal" style:font-weight-complex="normal"/>
    </style:style>
    <style:style style:name="T32" style:family="text">
      <style:text-properties officeooo:rsid="002ddae4"/>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RMS System</text:p>
      <text:p text:style-name="P2">Introduction:</text:p>
      <text:p text:style-name="P3"><text:tab/>HRMS application is an employee portal that supports them with various feature regarding their attendance, tasks, tickets and leave managing so on.</text:p>
      <text:p text:style-name="P3"><text:tab/>Employees are managed based on their roles and permission. An Employee can manage each section based on their role. For each employee permission may vary based on their roles and level.Levels of Employees are as follows:</text:p>
      <text:p text:style-name="P3"><text:tab/><text:tab/>CEO (first level) ==&gt; Project Manager(Second level) ==&gt; Team Leader and Project leader(Third level) ==&gt; Senior Developer(Fourth level) ==&gt; Junior developer (Fifth level) ==&gt; Trainee Developer.(Sixth level). It consists of following sections as follows:</text:p>
      <text:p text:style-name="P3"/>
      <text:p text:style-name="P3"><text:span text:style-name="T1">Resource Management</text:span>:</text:p>
      <text:p text:style-name="P3"><text:tab/><text:span text:style-name="T2">Employees</text:span>:</text:p>
      <text:p text:style-name="P3"><text:tab/><text:tab/>Employees <text:span text:style-name="T3">who works under each team can be viewed under this section. Only HR role has full access to add / edit / delete or deactive employees.</text:span></text:p>
      <text:p text:style-name="P4">Left side menu:</text:p>
      <text:p text:style-name="P4"/>
      <text:p text:style-name="P4"><draw:frame draw:style-name="fr1" draw:name="Image1" text:anchor-type="char" svg:width="6.376cm" svg:height="4.948cm" draw:z-index="0"><draw:image xlink:href="Pictures/10000000000000F1000000BB92D3BDA1.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3"/>
      <text:p text:style-name="P5"><text:span text:style-name="T2">Project Management</text:span>:</text:p>
      <text:p text:style-name="P6">Menu:</text:p>
      <text:p text:style-name="P6"><draw:frame draw:style-name="fr1" draw:name="Image2" text:anchor-type="char" svg:width="6.72cm" svg:height="5.741cm" draw:z-index="1"><draw:image xlink:href="Pictures/10000000000000FE000000D92716476D.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7"/>
      <text:p text:style-name="P5"/>
      <text:p text:style-name="P5"><text:tab/><text:span text:style-name="T4">Project Type</text:span><text:span text:style-name="T5">:</text:span></text:p>
      <text:p text:style-name="P8"><text:tab/><text:tab/>Project type can be added/edited or deleted in this section.</text:p>
      <text:p text:style-name="P9"><text:tab/><text:tab/>List of project types as <text:s/>Central, LMS, Recruitment.</text:p>
      <text:p text:style-name="P9"><text:tab/><text:tab/><text:span text:style-name="T6">By clicking “Add new project” button on the top right corner of page we can add new type.</text:span></text:p>
      <text:p text:style-name="P8"><text:tab/><text:tab/><text:span text:style-name="T7">Adding option:</text:span></text:p>
      <text:p text:style-name="P8"><draw:frame draw:style-name="fr1" draw:name="Image3" text:anchor-type="char" svg:width="4.948cm" svg:height="1.058cm" draw:z-index="2"><draw:image xlink:href="Pictures/10000000000000BB00000028EEFB3CA0.png" xlink:type="simple" xlink:show="embed" xlink:actuate="onLoad" draw:mime-type="image/png"/></draw:frame></text:p>
      <text:p text:style-name="P8"/>
      <text:p text:style-name="P10"><text:soft-page-break/>Editing and Deleting:<draw:frame draw:style-name="fr1" draw:name="Image4" text:anchor-type="char" svg:width="4.895cm" svg:height="4.207cm" draw:z-index="3"><draw:image xlink:href="Pictures/10000000000000B90000009F246F5FCD.png" xlink:type="simple" xlink:show="embed" xlink:actuate="onLoad" draw:mime-type="image/png"/></draw:frame></text:p>
      <text:p text:style-name="P10"/>
      <text:p text:style-name="P10"/>
      <text:p text:style-name="P10"/>
      <text:p text:style-name="P10"/>
      <text:p text:style-name="P11"/>
      <text:p text:style-name="P8"/>
      <text:p text:style-name="P8"/>
      <text:p text:style-name="P8"/>
      <text:p text:style-name="P5"><text:tab/><text:span text:style-name="T8">Manage Projects:</text:span></text:p>
      <text:p text:style-name="P12"><text:tab/><text:tab/>Projects can be added /edited or deleted in this section. Projects are added based on the project type. </text:p>
      <text:p text:style-name="P12"><text:tab/><text:span text:style-name="T9">Deleted Projects:</text:span></text:p>
      <text:p text:style-name="P13"><text:tab/><text:tab/>Projects that are deleted are displayed in this section. We can undo deleted projects in this section.</text:p>
      <text:p text:style-name="P14">Team Management:</text:p>
      <text:p text:style-name="P9"><text:tab/><text:span text:style-name="T10">Team Type</text:span><text:span text:style-name="T11">:</text:span></text:p>
      <text:p text:style-name="P9"><text:tab/><text:tab/><text:span text:style-name="T11">Team types can be managed in this section. Team types such as front end,Back end, Support and Devops.</text:span></text:p>
      <text:p text:style-name="P9"><text:tab/><text:span text:style-name="T12">List Teams</text:span><text:span text:style-name="T13">:</text:span></text:p>
      <text:p text:style-name="P9"><text:tab/><text:tab/><text:span text:style-name="T13">New teams can be added ,edited <text:s/>here. Team members for the team are added based on the <text:s/>on <text:s/>their project type and team type. For Each team control members are assigned. <text:s/>Under control members employees who have designation role as team leader and project leader comes under this section. </text:span><text:span text:style-name="T14">Activities of the team members details are amiled to project manager and also control members of the team.</text:span></text:p>
      <text:p text:style-name="P15">Adding Team:</text:p>
      <text:p text:style-name="P15"/>
      <text:p text:style-name="P15"/>
      <text:p text:style-name="P15"/>
      <text:p text:style-name="P15"/>
      <text:p text:style-name="P16">Task Management:</text:p>
      <text:p text:style-name="P17"><text:tab/><text:span text:style-name="T2">Assign Tasks</text:span>:</text:p>
      <text:p text:style-name="P17"><text:tab/><text:tab/>Under this section project manager can create new tasks based on the project type, project name, team type and team name. Base on the selected team name team members are selected. Once team members are selected and “Generate task for each member” <text:s/>is clicked .</text:p>
      <text:p text:style-name="P17">PM <text:s/>can assign tasks information individually for each task member. It is not mandatory that pm have to enter the details of the task compulsory. PM can select other team members also <text:s/>but cannot enter task name details of other members.</text:p>
      <text:p text:style-name="P17"><text:tab/><text:tab/>Once task is created it automatically mail will be sent to respective reporting authority such as control members and project manager.</text:p>
      <text:p text:style-name="P17"><text:tab/><text:tab/>Will task is created, <text:span text:style-name="T15">automatically task is assigned to respective control members in the team.</text:span></text:p>
      <text:p text:style-name="P17"><text:tab/><text:span text:style-name="T16">Task can be assigned for one or teams. Its limited as assigning to only two teams.</text:span></text:p>
      <text:p text:style-name="P17"><text:tab/><text:span text:style-name="T17">Manage Teams</text:span><text:span text:style-name="T18">:</text:span></text:p>
      <text:p text:style-name="P18"><text:tab/><text:tab/><text:span text:style-name="T18">Tasks that are present or assigned to our team are listed in this section with options to edit, delete and view details of the assigned members in the team.</text:span><text:span text:style-name="T16"> </text:span></text:p>
      <text:p text:style-name="P19"><text:tab/><text:span text:style-name="T2">Team status process</text:span>:</text:p>
      <text:p text:style-name="P18"><text:span text:style-name="T16">Task status is changed based on the activity of the team members status. If a</text:span><text:span text:style-name="T19">n</text:span><text:span text:style-name="T16"> assigned member change their status as in progress then team status is changed is set to Inprogress. If all members in the task who belong to our team is completed. Notification and email will be sent to PM stating that the task is completed and its waiting for PM’s approval. PM can approve the task by clicking Edit Approval button present in Task listing page. Once Team status is changed as Completed or the </text:span><text:soft-page-break/><text:span text:style-name="T16">status updated by PM. Mail and notification will be sent to team members in the task. </text:span><text:span text:style-name="T19">Only team status can be updated by PM</text:span><text:span text:style-name="T16"> (Note: only for team who work under current PM). If</text:span><text:span text:style-name="T19"> the task is assigned to two teams . Process gets repeated for the other team. If both team update their status as completed automatically Over all status gets updatye as completed. </text:span><text:span text:style-name="T20">Task approval for team members can be done by PM,TL and PL.</text:span></text:p>
      <text:p text:style-name="P18"><text:tab/><text:span text:style-name="T21">Edit Team members process</text:span><text:span text:style-name="T22">:</text:span></text:p>
      <text:p text:style-name="P18"><text:tab/><text:tab/><text:span text:style-name="T22">By clicking “Edit team members” icon present in the task listing page.</text:span><text:span text:style-name="T23">We can see details of the all members to whom task has been assigned. We can edit task details here. Delete members in the task and assign to new members in the task. (Note: Only for the members in the team </text:span><text:span text:style-name="T24">can be edited or deleted.</text:span><text:span text:style-name="T23">)</text:span></text:p>
      <text:p text:style-name="P18"/>
      <text:p text:style-name="P18"/>
      <text:p text:style-name="P20">Attendance Management:</text:p>
      <text:p text:style-name="P21"><text:tab/>User can view the details of their attendance details of checkin <text:s/>time and check out time for past as well as current days and also their time sheet entry made on respective days. But only can view details but can not edit the existing details.</text:p>
      <text:p text:style-name="P22"><text:tab/><text:span text:style-name="T25">For current day user can edit their timesheet details directly from this section. By clicking “Add Timeline” option present <text:s/>“Edit Timesheet” option we can add our work log here and save the details here. </text:span><text:span text:style-name="T26">By clicking “Go to Edit Page” we will be redirected </text:span><text:span text:style-name="T27">to </text:span><text:span text:style-name="T26">fill timesheet page.</text:span></text:p>
      <text:p text:style-name="P22"><text:tab/><text:span text:style-name="T2">Employee Attendance Info</text:span>:</text:p>
      <text:p text:style-name="P21"><text:tab/>PM,<text:span text:style-name="T25">TL,PL</text:span> has also option to view <text:span text:style-name="T25">the attendance details of the team members also. </text:span><text:span text:style-name="T28">By clicking radio button “Employee's Attendance” option, “Search By Employee Name” dropdown from the select dropdown select employee to see their details by navigating within days of the calendar.</text:span></text:p>
      <text:p text:style-name="P21"/>
      <text:p text:style-name="P23"><text:span text:style-name="T1">Leave Management</text:span>:</text:p>
      <text:p text:style-name="P23"><text:tab/><text:span text:style-name="T29">Leave Approval Request:</text:span></text:p>
      <text:p text:style-name="P23"><text:tab/><text:tab/><text:span text:style-name="T30">Team members including TL, PL who placed leave request get listed in this page. PM can view the details of the request placed by clicking View button under actions column (Eye icon). Once PM approve or deny with reason mail will be sent to applied person and reporting members of the team.</text:span></text:p>
      <text:p text:style-name="P23"/>
      <text:p text:style-name="P24"><text:span text:style-name="T2">Ticket Management</text:span>:</text:p>
      <text:p text:style-name="P24"><text:tab/><text:span text:style-name="T8">Add/View Tickets</text:span><text:span text:style-name="T31">:</text:span></text:p>
      <text:p text:style-name="P25"><text:tab/><text:tab/>Using this option we can raise tickets to the support team. Once ticket is raised mail as well as notification will be sent to PM of team type “Support”. We can view details of the tickets in the listing page.<text:span text:style-name="T32">Once ticket is raised and mail notification sent pm from support team assign ticket to members in support team. Ticket get closed, once solved by respective team member from the team.</text:span></text:p>
      <text:p text:style-name="P25"/>
      <text:p text:style-name="P26"><text:span text:style-name="T2">Reports</text:span>:</text:p>
      <text:p text:style-name="P27"><text:tab/><text:span text:style-name="T2">Tasks Report</text:span>:</text:p>
      <text:p text:style-name="P27"><text:tab/><text:tab/>Overall tasks details of each employee are listed here based on all projects are displayed here with individual and over all status of the task are listed in this page with search option. We can search based on start date,end date, project and employee. Using “Export Excel” we can generate report as excel sheet. </text:p>
      <text:p text:style-name="P27"/>
      <text:p text:style-name="P28"><text:tab/><text:span text:style-name="T2">Attendance Report</text:span>:</text:p>
      <text:p text:style-name="P28"><text:tab/><text:tab/>Under this type we can generate report based on their check in and checkout time entry made each day.Search option is present just bove the listing using that we can search based from and to date and team type.</text:p>
      <text:p text:style-name="P28"><text:soft-page-break/><text:tab/><text:tab/>We can download the generate report listing by clicking “Export to Excel” link button presentg near “Generate” button.</text:p>
      <text:p text:style-name="P28"/>
      <text:p text:style-name="P9"/>
      <text:p text:style-name="P29"><text:span text:style-name="T2">Timesheet</text:span>:</text:p>
      <text:p text:style-name="P29"><text:tab/><text:span text:style-name="T8">Fill Timesheet</text:span><text:span text:style-name="T31">:</text:span></text:p>
      <text:p text:style-name="P30"><text:tab/><text:tab/>We can fill details of the work log for the current day in this section. <text:span text:style-name="T6">User can checkout for the day only if they have completyed their timesheet.</text:span></text:p>
      <text:p text:style-name="P30"/>
      <text:p text:style-name="P30"/>
      <text:p text:style-name="P31"><text:span text:style-name="T2">Notification</text:span>:</text:p>
      <text:p text:style-name="P31"><text:tab/><text:span text:style-name="T31">Alert Notification:</text:span></text:p>
      <text:p text:style-name="P32"><text:tab/><text:tab/>Notification that are sent to the user get listed under this section. By clicking view icon under Actions column we can the detail information about each notifications.</text:p>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5" style:display-name="Heading 5" style:family="paragraph" style:parent-style-name="Heading" style:next-style-name="Text_20_body" style:default-outline-level="5" style:list-style-name="" style:class="chapter">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1" style:font-family-complex="'Lucida Sans'"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04T17:35:47.024889300</meta:creation-date>
    <dc:date>2025-12-05T15:37:21.497332800</dc:date>
    <meta:editing-duration>PT5H35M55S</meta:editing-duration>
    <meta:editing-cycles>29</meta:editing-cycles>
    <meta:generator>LibreOffice/25.8.3.2$Windows_X86_64 LibreOffice_project/8ca8d55c161d602844f5428fa4b58097424e324e</meta:generator>
    <meta:document-statistic meta:table-count="0" meta:image-count="4" meta:object-count="0" meta:page-count="4" meta:paragraph-count="63" meta:word-count="1158" meta:character-count="6878" meta:non-whitespace-character-count="5703"/>
  </office:meta>
</office:document-meta>
</file>